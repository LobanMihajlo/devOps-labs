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6000001C1413DDF01.png" manifest:media-type="image/png"/>
  <manifest:file-entry manifest:full-path="Pictures/1000000100000466000001C13FBC7572.png" manifest:media-type="image/png"/>
  <manifest:file-entry manifest:full-path="Pictures/100000010000026500000257A5B878A8.png" manifest:media-type="image/png"/>
  <manifest:file-entry manifest:full-path="Pictures/10000001000003E90000020BA3592E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4pt" officeooo:paragraph-rsid="000fd31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4pt" officeooo:paragraph-rsid="000fd314" fo:background-color="transparen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4pt" officeooo:rsid="000fd314" officeooo:paragraph-rsid="000fd314" fo:background-color="transparent" style:font-size-asian="14pt" style:font-size-complex="14pt"/>
    </style:style>
    <style:style style:name="P5" style:family="paragraph" style:parent-style-name="Standard">
      <style:paragraph-properties fo:text-align="left" style:justify-single-word="false"/>
      <style:text-properties fo:color="#000000" loext:opacity="100%" fo:font-size="14pt" officeooo:rsid="000fd314" officeooo:paragraph-rsid="000fd314" fo:background-color="transparent" style:font-size-asian="14pt" style:font-size-complex="14pt"/>
    </style:style>
    <style:style style:name="P6" style:family="paragraph" style:parent-style-name="Standard">
      <style:paragraph-properties fo:text-align="left" style:justify-single-word="false"/>
      <style:text-properties fo:color="#000000" loext:opacity="100%" fo:font-size="14pt" officeooo:rsid="001468be" officeooo:paragraph-rsid="001468be" fo:background-color="transparent" style:font-size-asian="14pt" style:font-size-complex="14pt"/>
    </style:style>
    <style:style style:name="P7" style:family="paragraph" style:parent-style-name="Standard">
      <style:paragraph-properties fo:text-align="left" style:justify-single-word="false"/>
      <style:text-properties fo:color="#000000" loext:opacity="100%" fo:font-size="14pt" fo:font-weight="bold" officeooo:rsid="000fd314" officeooo:paragraph-rsid="000fd314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fo:font-size="14pt" officeooo:rsid="000fe603" officeooo:paragraph-rsid="000fe603" fo:background-color="transparent" style:font-size-asian="14pt" style:font-size-complex="14pt"/>
    </style:style>
    <style:style style:name="P9" style:family="paragraph" style:parent-style-name="Standard">
      <style:paragraph-properties fo:text-align="left" style:justify-single-word="false"/>
      <style:text-properties fo:color="#000000" loext:opacity="100%" fo:font-size="14pt" fo:font-weight="bold" officeooo:rsid="000fe603" officeooo:paragraph-rsid="000fe603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weight="bold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weight="normal" fo:background-color="transparent" style:font-size-asian="14pt" style:font-size-complex="14pt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officeooo:rsid="000fe603" officeooo:paragraph-rsid="000fe603" fo:background-color="transparent" style:font-size-asian="14pt" style:font-size-complex="14pt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weight="bold" officeooo:rsid="000fe603" officeooo:paragraph-rsid="000fe603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officeooo:rsid="0010c8f6" officeooo:paragraph-rsid="0010c8f6" fo:background-color="transparent" style:font-size-asian="14pt" style:font-size-complex="14pt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italic" fo:font-weight="bold" officeooo:rsid="000fe603" officeooo:paragraph-rsid="000fe603" fo:background-color="transparent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weight="normal" officeooo:rsid="001468be" officeooo:paragraph-rsid="001468be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weight="normal" officeooo:rsid="0010c8f6" officeooo:paragraph-rsid="0010c8f6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fo:color="#bbbebf" loext:opacity="100%" fo:font-size="10.5pt" fo:font-weight="normal" officeooo:rsid="0010c8f6" officeooo:paragraph-rsid="0010c8f6" fo:background-color="#12131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fo:color="#bbbebf" loext:opacity="100%" fo:font-size="10.5pt" fo:font-weight="normal" fo:background-color="#121314"/>
    </style:style>
    <style:style style:name="P20" style:family="paragraph" style:parent-style-name="Standard">
      <style:paragraph-properties style:line-height-at-least="0.198in"/>
    </style:style>
    <style:style style:name="P21" style:family="paragraph" style:parent-style-name="Standard">
      <style:paragraph-properties fo:margin-top="0in" fo:margin-bottom="0.1965in" style:contextual-spacing="false" style:line-height-at-least="0.198in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fo:color="#8b949e" loext:opacity="100%" fo:font-size="10.5pt" fo:font-weight="normal" fo:background-color="#121314"/>
    </style:style>
    <style:style style:name="P2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officeooo:rsid="0010c8f6" officeooo:paragraph-rsid="00120db9" fo:background-color="transparent" style:font-size-asian="14pt" style:font-size-complex="14pt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italic" fo:font-weight="bold" officeooo:rsid="0010c8f6" officeooo:paragraph-rsid="0010c8f6" fo:background-color="transparent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officeooo:rsid="000fe603" officeooo:paragraph-rsid="00120db9" fo:background-color="transparent" style:font-size-asian="14pt" style:font-size-complex="14pt"/>
    </style:style>
    <style:style style:name="P26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italic" fo:font-weight="bold" officeooo:rsid="00120db9" officeooo:paragraph-rsid="00131fe9" fo:background-color="transparent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weight="bold" officeooo:rsid="000fe603" officeooo:paragraph-rsid="00120db9" fo:background-color="transparent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normal" fo:font-weight="normal" officeooo:rsid="00120db9" officeooo:paragraph-rsid="00120db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normal" fo:font-weight="normal" officeooo:rsid="001468be" officeooo:paragraph-rsid="001468b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in" fo:margin-right="0in" style:line-height-at-least="0.198in" fo:text-indent="0in" style:auto-text-indent="false"/>
      <style:text-properties officeooo:paragraph-rsid="00120db9"/>
    </style:style>
    <style:style style:name="P31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3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italic" fo:font-weight="bold" officeooo:rsid="00120db9" officeooo:paragraph-rsid="00120db9" fo:background-color="transparent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normal" fo:font-weight="bold" officeooo:rsid="00120db9" officeooo:paragraph-rsid="00120db9" fo:background-color="transparent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normal" fo:font-weight="bold" officeooo:rsid="00120db9" officeooo:paragraph-rsid="00131fe9" fo:background-color="transparent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normal" fo:font-weight="normal" officeooo:rsid="00120db9" officeooo:paragraph-rsid="00131fe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normal" fo:font-weight="normal" officeooo:rsid="00120db9" officeooo:paragraph-rsid="0013655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in" fo:margin-right="0in" style:line-height-at-least="0.198in" fo:text-indent="0in" style:auto-text-indent="false"/>
      <style:text-properties officeooo:paragraph-rsid="0013655e"/>
    </style:style>
    <style:style style:name="P38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normal" fo:font-weight="normal" officeooo:rsid="0013655e" officeooo:paragraph-rsid="0013655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italic" fo:font-weight="bold" officeooo:rsid="0013655e" officeooo:paragraph-rsid="0013655e" fo:background-color="transparent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normal" fo:font-weight="bold" officeooo:rsid="0013655e" officeooo:paragraph-rsid="0013655e" fo:background-color="transparent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margin-left="0in" fo:margin-right="0in" fo:margin-top="0in" fo:margin-bottom="0.1965in" style:contextual-spacing="false" style:line-height-at-least="0.198in" fo:text-indent="0in" style:auto-text-indent="false"/>
      <style:text-properties fo:color="#000000" loext:opacity="100%" fo:font-size="14pt" fo:font-style="normal" fo:font-weight="normal" officeooo:rsid="001468be" officeooo:paragraph-rsid="001468b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Text_20_body">
      <style:text-properties fo:font-size="14pt" fo:font-weight="bold" officeooo:paragraph-rsid="001468be" style:font-size-asian="14pt" style:font-weight-asian="bold" style:font-size-complex="14pt" style:font-weight-complex="bold"/>
    </style:style>
    <style:style style:name="P43" style:family="paragraph" style:parent-style-name="Text_20_body">
      <style:text-properties fo:font-size="14pt" style:font-size-asian="14pt" style:font-size-complex="14pt"/>
    </style:style>
    <style:style style:name="P44" style:family="paragraph" style:parent-style-name="Text_20_body">
      <style:text-properties fo:font-size="14pt" officeooo:paragraph-rsid="001667a5"/>
    </style:style>
    <style:style style:name="P45" style:family="paragraph" style:parent-style-name="Text_20_body">
      <style:text-properties fo:color="#000000" loext:opacity="100%" fo:font-size="14pt" fo:font-weight="normal" officeooo:rsid="00177568" officeooo:paragraph-rsid="00177568" fo:background-color="transparent" style:font-size-asian="14pt" style:font-size-complex="14pt"/>
    </style:style>
    <style:style style:name="P46" style:family="paragraph" style:parent-style-name="Text_20_body">
      <style:text-properties fo:font-size="14pt" fo:font-weight="bold" officeooo:paragraph-rsid="001667a5" style:font-size-asian="14pt" style:font-weight-asian="bold" style:font-size-complex="14pt" style:font-weight-complex="bold"/>
    </style:style>
    <style:style style:name="P47" style:family="paragraph" style:parent-style-name="Text_20_body">
      <style:text-properties fo:font-size="14pt" fo:font-style="italic" fo:font-weight="bold" officeooo:paragraph-rsid="001667a5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normal" fo:font-weight="normal" officeooo:rsid="00177568" officeooo:paragraph-rsid="0017756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normal" fo:font-weight="normal" officeooo:rsid="0013655e" officeooo:paragraph-rsid="0017756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normal" fo:font-weight="normal" officeooo:rsid="0013655e" officeooo:paragraph-rsid="0019437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italic" fo:font-weight="bold" officeooo:rsid="0013655e" officeooo:paragraph-rsid="00177568" fo:background-color="transparent" style:font-size-asian="14pt" style:font-style-asian="italic" style:font-weight-asian="bold" style:font-size-complex="14pt" style:font-style-complex="italic" style:font-weight-complex="bold"/>
    </style:style>
    <style:style style:name="P5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normal" fo:font-weight="bold" officeooo:rsid="0013655e" officeooo:paragraph-rsid="0019437d" fo:background-color="transparent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normal" fo:font-weight="normal" officeooo:rsid="0019437d" officeooo:paragraph-rsid="0019437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left="0in" fo:margin-right="0in" style:line-height-at-least="0.198in" fo:text-align="center" style:justify-single-word="false" fo:text-indent="0in" style:auto-text-indent="false"/>
      <style:text-properties fo:color="#000000" loext:opacity="100%" fo:font-size="14pt" fo:font-style="normal" fo:font-weight="normal" officeooo:rsid="0019437d" officeooo:paragraph-rsid="0019437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fo:font-size="14pt" fo:font-style="normal" fo:font-weight="bold" officeooo:rsid="001ac315" officeooo:paragraph-rsid="001ac315" fo:background-color="transparent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fo:font-size="14pt" fo:font-style="normal" fo:font-weight="normal" officeooo:rsid="001ac315" officeooo:paragraph-rsid="001ac31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4pt" fo:font-style="normal" fo:font-weight="normal" officeooo:rsid="001cb39c" officeooo:paragraph-rsid="0019437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margin-left="0in" fo:margin-right="0in" style:line-height-at-least="0.198in" fo:text-align="center" style:justify-single-word="false" fo:text-indent="0in" style:auto-text-indent="false"/>
      <style:text-properties fo:color="#000000" loext:opacity="100%" fo:font-size="14pt" fo:font-style="normal" fo:font-weight="normal" officeooo:rsid="001eb4c8" officeooo:paragraph-rsid="001eb4c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fo:font-size="14pt" fo:font-style="normal" fo:font-weight="normal" officeooo:rsid="001eb4c8" officeooo:paragraph-rsid="001eb4c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officeooo:paragraph-rsid="001eb4c8"/>
    </style:style>
    <style:style style:name="P61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</style:style>
    <style:style style:name="P62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bbbebf" loext:opacity="100%" style:font-name="Droid Sans Mono" fo:font-size="10.5pt" fo:font-weight="normal" fo:background-color="#121314"/>
    </style:style>
    <style:style style:name="P63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style:font-name="Droid Sans Mono" fo:font-size="10.5pt" fo:font-weight="normal" officeooo:rsid="001eb4c8" fo:background-color="transparent"/>
    </style:style>
    <style:style style:name="P64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fo:font-size="14pt" fo:font-weight="normal" officeooo:rsid="001eb4c8" officeooo:paragraph-rsid="001eb4c8" fo:background-color="transparent" style:font-size-asian="12.25pt" style:font-size-complex="14pt"/>
    </style:style>
    <style:style style:name="P65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fo:font-size="14pt" fo:font-weight="bold" officeooo:rsid="001eb4c8" officeooo:paragraph-rsid="001eb4c8" fo:background-color="transparent" style:font-size-asian="12.25pt" style:font-weight-asian="bold" style:font-size-complex="14pt" style:font-weight-complex="bold"/>
    </style:style>
    <style:style style:name="P66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fo:font-size="14pt" fo:font-style="italic" fo:font-weight="bold" officeooo:rsid="001eb4c8" officeooo:paragraph-rsid="001eb4c8" fo:background-color="transparent" style:font-size-asian="12.25pt" style:font-style-asian="italic" style:font-weight-asian="bold" style:font-size-complex="14pt" style:font-style-complex="italic" style:font-weight-complex="bold"/>
    </style:style>
    <style:style style:name="P67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fo:font-size="14pt" fo:font-style="normal" fo:font-weight="normal" officeooo:rsid="001f346e" officeooo:paragraph-rsid="001f346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fo:font-size="14pt" fo:font-style="normal" fo:font-weight="bold" officeooo:rsid="001eb4c8" officeooo:paragraph-rsid="001eb4c8" fo:background-color="transparent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bbbebf" loext:opacity="100%" style:font-name="Droid Sans Mono" fo:font-size="10.5pt" fo:font-style="normal" fo:font-weight="normal" officeooo:rsid="001f346e" officeooo:paragraph-rsid="001f346e" fo:background-color="#121314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margin-left="0in" fo:margin-right="0in" style:line-height-at-least="0.198in" fo:text-indent="0in" style:auto-text-indent="false"/>
      <style:text-properties fo:color="#bbbebf" loext:opacity="100%" style:font-name="Droid Sans Mono" fo:font-size="10.5pt" fo:font-weight="normal" fo:background-color="#121314"/>
    </style:style>
    <style:style style:name="P71" style:family="paragraph" style:parent-style-name="Standard">
      <style:paragraph-properties fo:margin-left="0in" fo:margin-right="0in" style:line-height-at-least="0.198in" fo:text-indent="0in" style:auto-text-indent="false"/>
      <style:text-properties fo:color="#ffa657" loext:opacity="100%" style:font-name="Droid Sans Mono" fo:font-size="10.5pt" fo:font-weight="normal" fo:background-color="#121314"/>
    </style:style>
    <style:style style:name="P72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fo:font-size="14pt" fo:font-weight="normal" officeooo:rsid="001eb4c8" officeooo:paragraph-rsid="00211086" fo:background-color="transparent" style:font-size-asian="12.25pt" style:font-size-complex="14pt"/>
    </style:style>
    <style:style style:name="P73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fo:font-size="14pt" fo:font-weight="bold" officeooo:rsid="001eb4c8" officeooo:paragraph-rsid="00211086" fo:background-color="transparent" style:font-size-asian="12.25pt" style:font-weight-asian="bold" style:font-size-complex="14pt" style:font-weight-complex="bold"/>
    </style:style>
    <style:style style:name="P74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fo:font-size="14pt" fo:font-style="italic" fo:font-weight="bold" officeooo:rsid="001eb4c8" officeooo:paragraph-rsid="00211086" fo:background-color="transparent" style:font-size-asian="12.25pt" style:font-style-asian="italic" style:font-weight-asian="bold" style:font-size-complex="14pt" style:font-style-complex="italic" style:font-weight-complex="bold"/>
    </style:style>
    <style:style style:name="P75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fo:font-size="14pt" fo:font-style="normal" fo:font-weight="normal" officeooo:rsid="001eb4c8" officeooo:paragraph-rsid="0021108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fo:font-size="14pt" fo:font-style="normal" fo:font-weight="normal" officeooo:rsid="001eb4c8" officeooo:paragraph-rsid="002646b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bbbebf" loext:opacity="100%" style:font-name="Droid Sans Mono" fo:font-size="10.5pt" fo:font-style="normal" fo:font-weight="normal" officeooo:rsid="001eb4c8" officeooo:paragraph-rsid="002646b2" fo:background-color="#121314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fo:font-size="14pt" fo:font-weight="normal" officeooo:rsid="001eb4c8" officeooo:paragraph-rsid="00290efc" fo:background-color="transparent" style:font-size-asian="12.25pt" style:font-size-complex="14pt"/>
    </style:style>
    <style:style style:name="P79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fo:font-size="14pt" fo:font-style="italic" fo:font-weight="bold" officeooo:rsid="001eb4c8" officeooo:paragraph-rsid="00290efc" fo:background-color="transparent" style:font-size-asian="12.25pt" style:font-style-asian="italic" style:font-weight-asian="bold" style:font-size-complex="14pt" style:font-style-complex="italic" style:font-weight-complex="bold"/>
    </style:style>
    <style:style style:name="P80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fo:font-size="14pt" fo:font-weight="bold" officeooo:rsid="001eb4c8" officeooo:paragraph-rsid="00290efc" fo:background-color="transparent" style:font-size-asian="12.25pt" style:font-weight-asian="bold" style:font-size-complex="14pt" style:font-weight-complex="bold"/>
    </style:style>
    <style:style style:name="P81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fo:font-size="14pt" fo:font-style="normal" fo:font-weight="normal" officeooo:rsid="001eb4c8" officeooo:paragraph-rsid="00290ef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margin-left="0in" fo:margin-right="0in" style:line-height-at-least="0.198in" fo:text-align="left" style:justify-single-word="false" fo:text-indent="0in" style:auto-text-indent="false"/>
      <style:text-properties fo:color="#000000" loext:opacity="100%" fo:font-size="14pt" fo:font-style="normal" fo:font-weight="normal" officeooo:rsid="00290efc" officeooo:paragraph-rsid="0021108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fd314"/>
    </style:style>
    <style:style style:name="T2" style:family="text">
      <style:text-properties officeooo:rsid="000fe603"/>
    </style:style>
    <style:style style:name="T3" style:family="text">
      <style:text-properties officeooo:rsid="002dc3c8"/>
    </style:style>
    <style:style style:name="T4" style:family="text">
      <style:text-properties officeooo:rsid="0010c8f6"/>
    </style:style>
    <style:style style:name="T5" style:family="text">
      <style:text-properties fo:font-weight="bold" officeooo:rsid="0010c8f6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20db9"/>
    </style:style>
    <style:style style:name="T8" style:family="text">
      <style:text-properties fo:color="#c586c0" loext:opacity="100%"/>
    </style:style>
    <style:style style:name="T9" style:family="text">
      <style:text-properties fo:color="#4ec9b0" loext:opacity="100%"/>
    </style:style>
    <style:style style:name="T10" style:family="text">
      <style:text-properties fo:color="#ff7b72" loext:opacity="100%"/>
    </style:style>
    <style:style style:name="T11" style:family="text">
      <style:text-properties fo:color="#d2a8ff" loext:opacity="100%"/>
    </style:style>
    <style:style style:name="T12" style:family="text">
      <style:text-properties fo:color="#ffa657" loext:opacity="100%"/>
    </style:style>
    <style:style style:name="T13" style:family="text">
      <style:text-properties fo:color="#c9d1d9" loext:opacity="100%"/>
    </style:style>
    <style:style style:name="T14" style:family="text">
      <style:text-properties fo:color="#d4d4d4" loext:opacity="100%"/>
    </style:style>
    <style:style style:name="T15" style:family="text">
      <style:text-properties fo:color="#a5d6ff" loext:opacity="100%"/>
    </style:style>
    <style:style style:name="T16" style:family="text">
      <style:text-properties fo:color="#569cd6" loext:opacity="100%"/>
    </style:style>
    <style:style style:name="T17" style:family="text">
      <style:text-properties fo:color="#c586c0" loext:opacity="100%" fo:font-size="10.5pt" fo:font-style="normal" fo:font-weight="normal" officeooo:rsid="00120db9" fo:background-color="#121314" loext:char-shading-value="0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bbbebf" loext:opacity="100%" fo:font-size="10.5pt" fo:font-style="normal" fo:font-weight="normal" officeooo:rsid="00120db9" fo:background-color="#121314" loext:char-shading-value="0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4ec9b0" loext:opacity="100%" fo:font-size="10.5pt" fo:font-style="normal" fo:font-weight="normal" officeooo:rsid="00120db9" fo:background-color="#121314" loext:char-shading-value="0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c9d1d9" loext:opacity="100%" fo:font-size="10.5pt" fo:font-style="normal" fo:font-weight="normal" officeooo:rsid="00120db9" fo:background-color="#121314" loext:char-shading-value="0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c586c0" loext:opacity="100%" fo:font-size="10.5pt" fo:font-weight="normal" fo:background-color="#121314" loext:char-shading-value="0"/>
    </style:style>
    <style:style style:name="T22" style:family="text">
      <style:text-properties fo:color="#bbbebf" loext:opacity="100%" fo:font-size="10.5pt" fo:font-weight="normal" fo:background-color="#121314" loext:char-shading-value="0"/>
    </style:style>
    <style:style style:name="T23" style:family="text">
      <style:text-properties fo:color="#ffa657" loext:opacity="100%" fo:font-size="10.5pt" fo:font-weight="normal" fo:background-color="#121314" loext:char-shading-value="0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131fe9"/>
    </style:style>
    <style:style style:name="T27" style:family="text">
      <style:text-properties officeooo:rsid="0013655e"/>
    </style:style>
    <style:style style:name="T28" style:family="text">
      <style:text-properties officeooo:rsid="00142cce"/>
    </style:style>
    <style:style style:name="T29" style:family="text">
      <style:text-properties officeooo:rsid="001468be"/>
    </style:style>
    <style:style style:name="T30" style:family="text">
      <style:text-properties officeooo:rsid="001667a5" style:font-size-asian="14pt" style:font-size-complex="14pt"/>
    </style:style>
    <style:style style:name="T31" style:family="text">
      <style:text-properties fo:color="#000000" loext:opacity="100%" fo:font-weight="normal" fo:background-color="transparent" loext:char-shading-value="0" style:font-size-asian="14pt" style:font-size-complex="14pt"/>
    </style:style>
    <style:style style:name="T32" style:family="text">
      <style:text-properties fo:font-weight="normal" officeooo:rsid="001667a5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1667a5"/>
    </style:style>
    <style:style style:name="T35" style:family="text">
      <style:text-properties fo:font-weight="bold" officeooo:rsid="00177568" style:font-weight-asian="bold" style:font-weight-complex="bold"/>
    </style:style>
    <style:style style:name="T36" style:family="text">
      <style:text-properties officeooo:rsid="0019437d"/>
    </style:style>
    <style:style style:name="T37" style:family="text">
      <style:text-properties officeooo:rsid="001cb39c"/>
    </style:style>
    <style:style style:name="T38" style:family="text">
      <style:text-properties fo:color="#c586c0" loext:opacity="100%" style:font-name="Droid Sans Mono" fo:font-size="10.5pt" fo:font-style="normal" fo:font-weight="normal" officeooo:rsid="001eb4c8" fo:background-color="#121314" loext:char-shading-value="0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bbbebf" loext:opacity="100%" style:font-name="Droid Sans Mono" fo:font-size="10.5pt" fo:font-style="normal" fo:font-weight="normal" officeooo:rsid="001eb4c8" fo:background-color="#121314" loext:char-shading-value="0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4ec9b0" loext:opacity="100%" style:font-name="Droid Sans Mono" fo:font-size="10.5pt" fo:font-style="normal" fo:font-weight="normal" officeooo:rsid="001eb4c8" fo:background-color="#121314" loext:char-shading-value="0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color="#c9d1d9" loext:opacity="100%" style:font-name="Droid Sans Mono" fo:font-size="10.5pt" fo:font-style="normal" fo:font-weight="normal" officeooo:rsid="001eb4c8" fo:background-color="#121314" loext:char-shading-value="0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color="#c586c0" loext:opacity="100%" style:font-name="Droid Sans Mono" fo:font-size="10.5pt" fo:font-weight="normal" fo:background-color="#121314" loext:char-shading-value="0"/>
    </style:style>
    <style:style style:name="T43" style:family="text">
      <style:text-properties fo:color="#bbbebf" loext:opacity="100%" style:font-name="Droid Sans Mono" fo:font-size="10.5pt" fo:font-weight="normal" fo:background-color="#121314" loext:char-shading-value="0"/>
    </style:style>
    <style:style style:name="T44" style:family="text">
      <style:text-properties fo:color="#ffa657" loext:opacity="100%" style:font-name="Droid Sans Mono" fo:font-size="10.5pt" fo:font-weight="normal" fo:background-color="#121314" loext:char-shading-value="0"/>
    </style:style>
    <style:style style:name="T45" style:family="text">
      <style:text-properties fo:font-style="normal" fo:font-weight="bold" officeooo:rsid="001f346e" style:font-size-asian="14pt" style:font-style-asian="normal" style:font-weight-asian="bold" style:font-style-complex="normal" style:font-weight-complex="bold"/>
    </style:style>
    <style:style style:name="T46" style:family="text">
      <style:text-properties officeooo:rsid="002646b2"/>
    </style:style>
    <style:style style:name="T47" style:family="text">
      <style:text-properties officeooo:rsid="00211086"/>
    </style:style>
    <style:style style:name="T48" style:family="text">
      <style:text-properties officeooo:rsid="0027ad51"/>
    </style:style>
    <style:style style:name="T49" style:family="text">
      <style:text-properties officeooo:rsid="00290efc"/>
    </style:style>
    <style:style style:name="T50" style:family="text">
      <style:text-properties officeooo:rsid="001eb4c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">2</text:span></text:p>
      <text:p text:style-name="P1"/>
      <text:p text:style-name="P2">Тема: “Контейнеризація”</text:p>
      <text:p text:style-name="P2"/>
      <text:p text:style-name="P3">Дослідницька частина</text:p>
      <text:p text:style-name="P3"/>
      <text:p text:style-name="P4">1) Python application</text:p>
      <text:p text:style-name="P5"/>
      <text:p text:style-name="P6">1. </text:p>
      <text:p text:style-name="P5">Записуємо залежності проєкту у файл <text:span text:style-name="T2">requirements.txt:</text:span></text:p>
      <text:p text:style-name="P5"/>
      <text:p text:style-name="P7">pip freeze &gt; requirements.txt</text:p>
      <text:p text:style-name="P5"/>
      <text:p text:style-name="P8">Створення неоптимізованої версії Dockerfile:</text:p>
      <text:p text:style-name="P8"/>
      <text:p text:style-name="P9">FROM python:3.1<text:span text:style-name="T3">2</text:span>-bookworm</text:p>
      <text:p text:style-name="P10">WORKDIR /app</text:p>
      <text:p text:style-name="P10">COPY . .</text:p>
      <text:p text:style-name="P10">RUN pip install --no-cache-dir -r requirements.txt</text:p>
      <text:p text:style-name="P10">CMD ["uvicorn", "spaceship.app:app", "--host", "0.0.0.0", "--port", "8080"]</text:p>
      <text:p text:style-name="P11"/>
      <text:p text:style-name="P12">У поточній версії спочатку копіюється весь код, а потім встановлюються залежності. Відповідно, при будь-якій зміні у коді(навіть мінімальній) збірка починається із самого початку.</text:p>
      <text:p text:style-name="P12"/>
      <text:p text:style-name="P12">Для кращої точності вимірювань, перед початком збірки завантажимо базовий образ:</text:p>
      <text:p text:style-name="P12"/>
      <text:p text:style-name="P13">docker pull python:3.12-bookworm</text:p>
      <text:p text:style-name="P12"/>
      <text:p text:style-name="P12">Перша збірка неоптимізованого <text:span text:style-name="T4">Dockerfile: </text:span><text:span text:style-name="T5">time docker build -t py-app:bad -f Dockerfile.v1 .</text:span></text:p>
      <text:p text:style-name="P13"/>
      <text:p text:style-name="P14">Результати:</text:p>
      <text:p text:style-name="P15">real <text:s text:c="3"/>0m11.821s</text:p>
      <text:p text:style-name="P15">user <text:s text:c="3"/>0m0.333s</text:p>
      <text:p text:style-name="P15">sys <text:s text:c="4"/>0m0.176s</text:p>
      <text:p text:style-name="P12"/>
      <text:p text:style-name="P12"><text:span text:style-name="T4">Розмір образу: </text:span><text:span text:style-name="T6">docker images py-app:bad</text:span></text:p>
      <text:p text:style-name="P13">IMAGE <text:s text:c="7"/>ID <text:s text:c="12"/>DISK USAGE <text:s text:c="2"/>CONTENT SIZE <text:s text:c="2"/>EXTRA</text:p>
      <text:p text:style-name="P13">py-app:bad <text:s text:c="2"/>6fbbfe048049 <text:s text:c="6"/>1.56GB <text:s text:c="9"/>404MB</text:p>
      <text:p text:style-name="P13"/>
      <text:p text:style-name="P16">2.</text:p>
      <text:p text:style-name="P17">Повторна збірка(було додано коментар у <text:span text:style-name="T7">spaceship/</text:span>app.py):</text:p>
      <text:p text:style-name="P17"/>
      <text:p text:style-name="P18"><text:soft-page-break/><text:span text:style-name="T8">from</text:span> <text:span text:style-name="T9">fastapi</text:span> <text:span text:style-name="T8">import</text:span> <text:span text:style-name="T9">FastAPI</text:span></text:p>
      <text:p text:style-name="P19"><text:span text:style-name="T8">from</text:span> <text:span text:style-name="T9">fastapi</text:span>.<text:span text:style-name="T9">staticfiles</text:span> <text:span text:style-name="T8">import</text:span> <text:span text:style-name="T9">StaticFiles</text:span></text:p>
      <text:p text:style-name="P19"><text:span text:style-name="T8">from</text:span> <text:span text:style-name="T9">starlette</text:span>.<text:span text:style-name="T9">responses</text:span> <text:span text:style-name="T8">import</text:span> <text:span text:style-name="T9">FileResponse</text:span></text:p>
      <text:p text:style-name="P20"/>
      <text:p text:style-name="P19"><text:span text:style-name="T8">from</text:span> <text:span text:style-name="T9">spaceship</text:span>.<text:span text:style-name="T9">config</text:span> <text:span text:style-name="T8">import</text:span> <text:span text:style-name="T9">Settings</text:span></text:p>
      <text:p text:style-name="P19"><text:span text:style-name="T8">from</text:span> <text:span text:style-name="T9">spaceship</text:span>.<text:span text:style-name="T9">routers</text:span> <text:span text:style-name="T8">import</text:span> <text:span text:style-name="T9">api</text:span>, <text:span text:style-name="T9">health</text:span></text:p>
      <text:p text:style-name="P21"/>
      <text:p text:style-name="P19"><text:span text:style-name="T10">def</text:span> <text:span text:style-name="T11">make_app</text:span>(<text:span text:style-name="T12">settings</text:span>: <text:span text:style-name="T9">Settings</text:span>) -&gt; <text:span text:style-name="T9">FastAPI</text:span>:</text:p>
      <text:p text:style-name="P19"><text:span text:style-name="T13">app</text:span> <text:span text:style-name="T14">=</text:span> <text:span text:style-name="T9">FastAPI</text:span>(</text:p>
      <text:p text:style-name="P19"><text:span text:style-name="T12">debug</text:span><text:span text:style-name="T14">=</text:span><text:span text:style-name="T12">settings</text:span>.<text:span text:style-name="T13">debug</text:span>,</text:p>
      <text:p text:style-name="P19"><text:span text:style-name="T12">title</text:span><text:span text:style-name="T14">=</text:span><text:span text:style-name="T12">settings</text:span>.<text:span text:style-name="T13">app_title</text:span>,</text:p>
      <text:p text:style-name="P19"><text:span text:style-name="T12">description</text:span><text:span text:style-name="T14">=</text:span><text:span text:style-name="T12">settings</text:span>.<text:span text:style-name="T13">app_description</text:span>,</text:p>
      <text:p text:style-name="P19"><text:span text:style-name="T12">version</text:span><text:span text:style-name="T14">=</text:span><text:span text:style-name="T12">settings</text:span>.<text:span text:style-name="T13">app_version</text:span>,</text:p>
      <text:p text:style-name="P19">)</text:p>
      <text:p text:style-name="P19"><text:span text:style-name="T13">app</text:span>.<text:span text:style-name="T13">state</text:span>.settings <text:span text:style-name="T14">=</text:span> <text:span text:style-name="T12">settings</text:span></text:p>
      <text:p text:style-name="P20"/>
      <text:p text:style-name="P19"><text:span text:style-name="T8">if</text:span> <text:span text:style-name="T12">settings</text:span>.<text:span text:style-name="T13">debug</text:span>:</text:p>
      <text:p text:style-name="P19"><text:span text:style-name="T13">app</text:span>.<text:span text:style-name="T11">mount</text:span>(<text:span text:style-name="T15">'/static'</text:span>, <text:span text:style-name="T9">StaticFiles</text:span>(<text:span text:style-name="T12">directory</text:span><text:span text:style-name="T14">=</text:span><text:span text:style-name="T15">'build'</text:span>), <text:span text:style-name="T12">name</text:span><text:span text:style-name="T14">=</text:span><text:span text:style-name="T15">'static'</text:span>)</text:p>
      <text:p text:style-name="P20"/>
      <text:p text:style-name="P19"><text:span text:style-name="T13">app</text:span>.<text:span text:style-name="T11">include_router</text:span>(<text:span text:style-name="T9">api</text:span>.<text:span text:style-name="T13">router</text:span>, <text:span text:style-name="T12">prefix</text:span><text:span text:style-name="T14">=</text:span><text:span text:style-name="T15">'/api'</text:span>, <text:span text:style-name="T12">tags</text:span><text:span text:style-name="T14">=</text:span>[<text:span text:style-name="T15">'api'</text:span>])</text:p>
      <text:p text:style-name="P19"><text:span text:style-name="T13">app</text:span>.<text:span text:style-name="T11">include_router</text:span>(<text:span text:style-name="T9">health</text:span>.<text:span text:style-name="T13">router</text:span>, <text:span text:style-name="T12">prefix</text:span><text:span text:style-name="T14">=</text:span><text:span text:style-name="T15">'/health'</text:span>, <text:span text:style-name="T12">tags</text:span><text:span text:style-name="T14">=</text:span>[<text:span text:style-name="T15">'health'</text:span>])</text:p>
      <text:p text:style-name="P20"/>
      <text:p text:style-name="P19"><text:span text:style-name="T11">@</text:span><text:span text:style-name="T13">app</text:span><text:span text:style-name="T11">.get</text:span>(<text:span text:style-name="T15">'/'</text:span>, <text:span text:style-name="T12">include_in_schema</text:span><text:span text:style-name="T14">=</text:span><text:span text:style-name="T16">False</text:span>, <text:span text:style-name="T12">response_class</text:span><text:span text:style-name="T14">=</text:span><text:span text:style-name="T9">FileResponse</text:span>)</text:p>
      <text:p text:style-name="P19"><text:span text:style-name="T10">async</text:span> <text:span text:style-name="T10">def</text:span> <text:span text:style-name="T11">root</text:span>() -&gt; <text:span text:style-name="T9">str</text:span>:</text:p>
      <text:p text:style-name="P19"><text:span text:style-name="T8">return</text:span> <text:span text:style-name="T15">'build/index.html'</text:span></text:p>
      <text:p text:style-name="P20"/>
      <text:p text:style-name="P19"><text:span text:style-name="T8">return</text:span> <text:span text:style-name="T13">app</text:span></text:p>
      <text:p text:style-name="P22">##muhehe by m-l</text:p>
      <text:p text:style-name="P17"/>
      <text:p text:style-name="P23">Результати:</text:p>
      <text:p text:style-name="P24">real <text:s text:c="3"/>0m11.858s</text:p>
      <text:p text:style-name="P24">user <text:s text:c="3"/>0m0.172s</text:p>
      <text:p text:style-name="P24">sys <text:s text:c="4"/>0m0.078s</text:p>
      <text:p text:style-name="P24"/>
      <text:p text:style-name="P25"><text:span text:style-name="T4">Розмір образу: </text:span><text:span text:style-name="T6">docker images py-app:bad</text:span></text:p>
      <text:p text:style-name="P26"><text:tab/><text:tab/><text:tab/><text:tab/><text:tab/><text:tab/><text:tab/><text:tab/>i Info → <text:s text:c="2"/>U <text:s/>In Use</text:p>
      <text:p text:style-name="P27">IMAGE <text:s text:c="7"/>ID <text:s text:c="12"/>DISK USAGE <text:s text:c="2"/>CONTENT SIZE <text:s text:c="2"/>EXTRA</text:p>
      <text:p text:style-name="P27">py-app:bad <text:s text:c="2"/>6fbbfe048049 <text:s text:c="6"/>1.56GB <text:s text:c="9"/>404MB</text:p>
      <text:p text:style-name="P24"/>
      <text:p text:style-name="P28">Отже, час збірки лишився приблизно однаковим, хоча основний функціонал та залежності не змінилися. Розмір образу ідентичний до попередньої версії.</text:p>
      <text:p text:style-name="P28"/>
      <text:p text:style-name="P29">3.</text:p>
      <text:p text:style-name="P28">Тепер, створимо Dockerfile.v2, що спочатку скопіює requirements.txt, встановить залежності, і лише потім скопіює код. Такий підхід є більш оптимізованим, адже попередні етапи збірки закешуються, і при зміні в коді не доведеться заново встановлювати усі залежності.</text:p>
      <text:p text:style-name="P28"><text:soft-page-break/></text:p>
      <text:p text:style-name="P30"><text:span text:style-name="T17">FROM</text:span><text:span text:style-name="T18"> </text:span><text:span text:style-name="T19">python</text:span><text:span text:style-name="T18">:</text:span><text:span text:style-name="T20">3.12-bookworm</text:span></text:p>
      <text:p text:style-name="P31"><text:span text:style-name="T21">WORKDIR</text:span><text:span text:style-name="T22"> </text:span><text:span text:style-name="T23">/app</text:span></text:p>
      <text:p text:style-name="P31"><text:span text:style-name="T21">COPY</text:span><text:span text:style-name="T22"> </text:span><text:span text:style-name="T23">requirements.txt</text:span><text:span text:style-name="T22"> </text:span><text:span text:style-name="T23">.</text:span></text:p>
      <text:p text:style-name="P31"><text:span text:style-name="T21">RUN</text:span><text:span text:style-name="T22"> </text:span><text:span text:style-name="T23">pip</text:span><text:span text:style-name="T22"> </text:span><text:span text:style-name="T23">install</text:span><text:span text:style-name="T22"> </text:span><text:span text:style-name="T23">-r</text:span><text:span text:style-name="T22"> </text:span><text:span text:style-name="T23">requirements.txt</text:span></text:p>
      <text:p text:style-name="P31"><text:span text:style-name="T21">COPY</text:span><text:span text:style-name="T22"> </text:span><text:span text:style-name="T23">.</text:span><text:span text:style-name="T22"> </text:span><text:span text:style-name="T23">.</text:span></text:p>
      <text:p text:style-name="P19"><text:span text:style-name="T8">CMD</text:span> <text:span text:style-name="T12">[</text:span><text:span text:style-name="T15">"uvicorn"</text:span><text:span text:style-name="T12">,</text:span> <text:span text:style-name="T15">"spaceship.app:app"</text:span><text:span text:style-name="T12">,</text:span> <text:span text:style-name="T15">"--host"</text:span><text:span text:style-name="T12">,</text:span> <text:span text:style-name="T15">"0.0.0.0"</text:span><text:span text:style-name="T12">,</text:span> <text:span text:style-name="T15">"--port"</text:span><text:span text:style-name="T12">,</text:span> <text:span text:style-name="T15">"8080"</text:span><text:span text:style-name="T12">]</text:span></text:p>
      <text:p text:style-name="P28"/>
      <text:p text:style-name="P28">Перша збірка: <text:span text:style-name="T6">time docker build -t py-app:good -f Dockerfile.v2 .</text:span></text:p>
      <text:p text:style-name="P28"/>
      <text:p text:style-name="P28">Результати:</text:p>
      <text:p text:style-name="P28"/>
      <text:p text:style-name="P32">real <text:s text:c="3"/>0m14.320s</text:p>
      <text:p text:style-name="P32">user <text:s text:c="3"/>0m0.186s</text:p>
      <text:p text:style-name="P32">sys <text:s text:c="4"/>0m0.089s</text:p>
      <text:p text:style-name="P32"/>
      <text:p text:style-name="P32"><text:span text:style-name="T24">Розмір образу: </text:span><text:span text:style-name="T25">docker images py-app:good</text:span></text:p>
      <text:p text:style-name="P32"><text:s text:c="79"/><text:span text:style-name="T25">i Info → <text:s text:c="2"/>U <text:s/>In Use</text:span></text:p>
      <text:p text:style-name="P33">IMAGE <text:s text:c="8"/>ID <text:s text:c="12"/>DISK USAGE <text:s text:c="2"/>CONTENT SIZE <text:s text:c="2"/>EXTRA</text:p>
      <text:p text:style-name="P33">py-app:good <text:s text:c="2"/>6f2b0c3ce3af <text:s text:c="6"/>1.56GB <text:s text:c="9"/>404MB</text:p>
      <text:p text:style-name="P33"/>
      <text:p text:style-name="P28">Повторна збірка<text:span text:style-name="T26">(додано ще один коментар у той самий файл)</text:span>:</text:p>
      <text:p text:style-name="P28"/>
      <text:p text:style-name="P28"><draw:frame draw:style-name="fr1" draw:name="Image1" text:anchor-type="char" svg:width="6.6929in" svg:height="3.4965in" draw:z-index="0"><draw:image xlink:href="Pictures/10000001000003E90000020BA3592EE8.png" xlink:type="simple" xlink:show="embed" xlink:actuate="onLoad" draw:mime-type="image/png"/></draw:frame></text:p>
      <text:p text:style-name="P28"/>
      <text:p text:style-name="P33">time docker build -t py-app:good -f Dockerfile.v2 . </text:p>
      <text:p text:style-name="P32"/>
      <text:p text:style-name="P32">real <text:s text:c="3"/>0m1.389s</text:p>
      <text:p text:style-name="P32">user <text:s text:c="3"/>0m0.155s</text:p>
      <text:p text:style-name="P32">sys <text:s text:c="4"/>0m0.067s</text:p>
      <text:p text:style-name="P32"><text:soft-page-break/></text:p>
      <text:p text:style-name="P26"><text:span text:style-name="T24">Розмір образу: </text:span><text:span text:style-name="T25">docker images py-app:good</text:span></text:p>
      <text:p text:style-name="P26"><text:s text:c="79"/><text:span text:style-name="T25">i Info → <text:s text:c="2"/>U <text:s/>In Use</text:span></text:p>
      <text:p text:style-name="P34">IMAGE <text:s text:c="8"/>ID <text:s text:c="12"/>DISK USAGE <text:s text:c="2"/>CONTENT SIZE <text:s text:c="2"/>EXTRA</text:p>
      <text:p text:style-name="P34">py-app:good <text:s text:c="2"/>6f2b0c3ce3af <text:s text:c="6"/>1.56GB <text:s text:c="9"/>404MB</text:p>
      <text:p text:style-name="P34"/>
      <text:p text:style-name="P35">У цьому випадку, збірка відбулася набагато швидше через кешування попередніх шарів у <text:span text:style-name="T26">Dockerfile.v2.</text:span></text:p>
      <text:p text:style-name="P35"/>
      <text:p text:style-name="P29">4.</text:p>
      <text:p text:style-name="P36">Тепер змінимо <text:span text:style-name="T27">базовий образ у <text:s/></text:span><text:span text:style-name="T26">Dockerfile.v2:</text:span></text:p>
      <text:p text:style-name="P36"/>
      <text:p text:style-name="P37"><text:span text:style-name="T17">FROM</text:span><text:span text:style-name="T18"> </text:span><text:span text:style-name="T19">python</text:span><text:span text:style-name="T18">:</text:span><text:span text:style-name="T20">3.12-alpine</text:span></text:p>
      <text:p text:style-name="P31"><text:span text:style-name="T21">WORKDIR</text:span><text:span text:style-name="T22"> </text:span><text:span text:style-name="T23">/app</text:span></text:p>
      <text:p text:style-name="P31"><text:span text:style-name="T21">COPY</text:span><text:span text:style-name="T22"> </text:span><text:span text:style-name="T23">requirements.txt</text:span><text:span text:style-name="T22"> </text:span><text:span text:style-name="T23">.</text:span></text:p>
      <text:p text:style-name="P31"><text:span text:style-name="T21">RUN</text:span><text:span text:style-name="T22"> </text:span><text:span text:style-name="T23">pip</text:span><text:span text:style-name="T22"> </text:span><text:span text:style-name="T23">install</text:span><text:span text:style-name="T22"> </text:span><text:span text:style-name="T23">-r</text:span><text:span text:style-name="T22"> </text:span><text:span text:style-name="T23">requirements.txt</text:span></text:p>
      <text:p text:style-name="P31"><text:span text:style-name="T21">COPY</text:span><text:span text:style-name="T22"> </text:span><text:span text:style-name="T23">.</text:span><text:span text:style-name="T22"> </text:span><text:span text:style-name="T23">.</text:span></text:p>
      <text:p text:style-name="P19"><text:span text:style-name="T8">CMD</text:span> <text:span text:style-name="T12">[</text:span><text:span text:style-name="T15">"uvicorn"</text:span><text:span text:style-name="T12">,</text:span> <text:span text:style-name="T15">"spaceship.app:app"</text:span><text:span text:style-name="T12">,</text:span> <text:span text:style-name="T15">"--host"</text:span><text:span text:style-name="T12">,</text:span> <text:span text:style-name="T15">"0.0.0.0"</text:span><text:span text:style-name="T12">,</text:span> <text:span text:style-name="T15">"--port"</text:span><text:span text:style-name="T12">,</text:span> <text:span text:style-name="T15">"8080"</text:span><text:span text:style-name="T12">]</text:span></text:p>
      <text:p text:style-name="P36"/>
      <text:p text:style-name="P38">Перша збірка:</text:p>
      <text:p text:style-name="P39"/>
      <text:p text:style-name="P39">real <text:s text:c="3"/>0m21.248s</text:p>
      <text:p text:style-name="P39">user <text:s text:c="3"/>0m0.218s</text:p>
      <text:p text:style-name="P39">sys <text:s text:c="4"/>0m0.103s</text:p>
      <text:p text:style-name="P39"/>
      <text:p text:style-name="P38">Розмір образу:</text:p>
      <text:p text:style-name="P40"/>
      <text:p text:style-name="P40">docker images py-app:good</text:p>
      <text:p text:style-name="P40"><text:s text:c="79"/>i Info → <text:s text:c="2"/>U <text:s/>In Use</text:p>
      <text:p text:style-name="P40">IMAGE <text:s text:c="8"/>ID <text:s text:c="12"/>DISK USAGE <text:s text:c="2"/>CONTENT SIZE <text:s text:c="2"/>EXTRA</text:p>
      <text:p text:style-name="P40">py-app:good <text:s text:c="2"/>ed0215b605ec <text:s text:c="7"/>167MB <text:s text:c="10"/>42MB</text:p>
      <text:p text:style-name="P40"/>
      <text:p text:style-name="P38">Повторна збірка:</text:p>
      <text:p text:style-name="P38"/>
      <text:p text:style-name="P39">real <text:s text:c="3"/>0m0.950s</text:p>
      <text:p text:style-name="P39">user <text:s text:c="3"/>0m0.146s</text:p>
      <text:p text:style-name="P39">sys <text:s text:c="4"/>0m0.082s</text:p>
      <text:p text:style-name="P39"/>
      <text:p text:style-name="P38">Розмір образу:</text:p>
      <text:p text:style-name="P40"/>
      <text:p text:style-name="P40">docker images py-app:good</text:p>
      <text:p text:style-name="P40"><text:s text:c="79"/>i Info → <text:s text:c="2"/>U <text:s/>In Use</text:p>
      <text:p text:style-name="P40">IMAGE <text:s text:c="8"/>ID <text:s text:c="12"/>DISK USAGE <text:s text:c="2"/>CONTENT SIZE <text:s text:c="2"/>EXTRA</text:p>
      <text:p text:style-name="P40">py-app:good <text:s text:c="2"/>ed0215b605ec <text:s text:c="7"/>167MB <text:s text:c="10"/>42MB</text:p>
      <text:p text:style-name="P39"/>
      <text:p text:style-name="P38"><text:soft-page-break/>Отже, оскільки було змінено базовий образ то довелося повністю перевиконувати збірку, саме тому час першої збірки помітно виріс. Повторні збірки відбувалися значно швидше, розмір образу зменшився у кілька разів через використання <text:span text:style-name="T28">alpine</text:span>.</text:p>
      <text:p text:style-name="P38"/>
      <text:p text:style-name="P29">5.</text:p>
      <text:p text:style-name="P41">Додавання нової залежності:</text:p>
      <text:p text:style-name="P42">pip install numpy </text:p>
      <text:p text:style-name="P42">pip freeze &gt; requirements.txt</text:p>
      <text:p text:style-name="P43">Оновлений <text:span text:style-name="T29">spaceship/routers/api.py:</text:span></text:p>
      <text:p text:style-name="P44"><draw:frame draw:style-name="fr2" draw:name="Image2" text:anchor-type="char" svg:width="6.3854in" svg:height="6.2398in" draw:z-index="1"><draw:image xlink:href="Pictures/100000010000026500000257A5B878A8.png" xlink:type="simple" xlink:show="embed" xlink:actuate="onLoad" draw:mime-type="image/png"/></draw:frame><text:span text:style-name="T30">Dockerfile.alpine аналогічний до Dockerfile.v2, Dockerfile.debian – використовує базовий образ </text:span><text:span text:style-name="T31">python:3.12-bookworm</text:span></text:p>
      <text:p text:style-name="P45">Alpine:</text:p>
      <text:p text:style-name="P46"><text:soft-page-break/><text:span text:style-name="T32">Час збірки: </text:span>time docker build -t py-app:good-alpine -f Dockerfile.alpine .</text:p>
      <text:p text:style-name="P47">real <text:s text:c="3"/>0m18.589s</text:p>
      <text:p text:style-name="P47">user <text:s text:c="3"/>0m0.222s</text:p>
      <text:p text:style-name="P47">sys <text:s text:c="4"/>0m0.115s</text:p>
      <text:p text:style-name="P40"><text:span text:style-name="T33">Розмір образу:</text:span> docker images py-app:good-alpine</text:p>
      <text:p text:style-name="P40"><text:s text:c="79"/>i Info → <text:s text:c="2"/>U <text:s/>In Use</text:p>
      <text:p text:style-name="P40">IMAGE <text:s text:c="15"/>ID <text:s text:c="12"/>DISK USAGE <text:s text:c="2"/>CONTENT SIZE <text:s text:c="2"/>EXTRA</text:p>
      <text:p text:style-name="P40">py-app:good-alpine <text:s text:c="2"/>217b531eb1e0 <text:s text:c="7"/>397MB <text:s text:c="9"/>103MB</text:p>
      <text:p text:style-name="P38"/>
      <text:p text:style-name="P48">Debian:</text:p>
      <text:p text:style-name="P49"/>
      <text:p text:style-name="P50"><text:span text:style-name="T34">Час збірки: </text:span><text:span text:style-name="T35">t</text:span><text:span text:style-name="T6">ime docker build -t py-app:good-debian -f Dockerfile.debian .</text:span></text:p>
      <text:p text:style-name="P49"/>
      <text:p text:style-name="P51">real <text:s text:c="3"/>0m18.001s</text:p>
      <text:p text:style-name="P51">user <text:s text:c="3"/>0m0.209s</text:p>
      <text:p text:style-name="P51">sys <text:s text:c="4"/>0m0.125s</text:p>
      <text:p text:style-name="P51"/>
      <text:p text:style-name="P52"><text:span text:style-name="T33">Розмір образу:</text:span> docker images py-app:good-<text:span text:style-name="T36">debian</text:span> <text:s text:c="156"/><text:tab/><text:tab/><text:tab/><text:tab/><text:tab/><text:tab/><text:tab/><text:tab/><text:tab/>i Info → <text:s text:c="2"/>U <text:s/>In Use</text:p>
      <text:p text:style-name="P52">IMAGE <text:s text:c="15"/>ID <text:s text:c="12"/>DISK USAGE <text:s text:c="2"/>CONTENT SIZE <text:s text:c="2"/>EXTRA</text:p>
      <text:p text:style-name="P52">py-app:good-debian <text:s text:c="2"/>e2b8afaa20c8 <text:s text:c="6"/>1.78GB <text:s text:c="9"/>461MB</text:p>
      <text:p text:style-name="P52"/>
      <text:p text:style-name="P53">Висновок: Образ, що базується на alpine в рази менший. Хоча alpine трохи програє у швидкості першої збірки, для сучасних версій pip ця різниця не є дуже відчутною. Відповідно, для production середовища краще обирати alpine(бо важливо мати невеликий розмір), а для development – debian(бо важлива швидкість збірки образів).</text:p>
      <text:p text:style-name="P53"/>
      <text:p text:style-name="P54">2) Musl (Alpine) vs glibc (Debian/Ubuntu/etc)</text:p>
      <text:p text:style-name="P55">Musl logs:</text:p>
      <text:p text:style-name="P56">dnsmasq[1]: query[AAAA] myservice.internal from 172.19.0.3</text:p>
      <text:p text:style-name="P56">dnsmasq[1]: forwarded myservice.internal to 127.0.0.11</text:p>
      <text:p text:style-name="P56">dnsmasq[1]: reply myservice.internal is NXDOMAIN</text:p>
      <text:p text:style-name="P56">dnsmasq[1]: query[AAAA] myservice.internal.corp from 172.19.0.3</text:p>
      <text:p text:style-name="P56">dnsmasq[1]: forwarded myservice.internal.corp to 127.0.0.11</text:p>
      <text:p text:style-name="P56">dnsmasq[1]: reply myservice.internal.corp is NODATA-IPv6</text:p>
      <text:p text:style-name="P56">dnsmasq[1]: query[A] myservice.internal from 172.19.0.3</text:p>
      <text:p text:style-name="P56">dnsmasq[1]: cached myservice.internal is NXDOMAIN</text:p>
      <text:p text:style-name="P56">dnsmasq[1]: query[A] myservice.internal.corp from 172.19.0.3</text:p>
      <text:p text:style-name="P56">dnsmasq[1]: config myservice.internal.corp is 10.0.0.50</text:p>
      <text:p text:style-name="P56"/>
      <text:p text:style-name="P55">Debian logs:</text:p>
      <text:p text:style-name="P56"><text:soft-page-break/>dnsmasq[1]: query[AAAA] myservice.internal from 172.19.0.3</text:p>
      <text:p text:style-name="P56">dnsmasq[1]: cached myservice.internal is NXDOMAIN</text:p>
      <text:p text:style-name="P56">dnsmasq[1]: query[A] myservice.internal from 172.19.0.3</text:p>
      <text:p text:style-name="P56">dnsmasq[1]: cached myservice.internal is NXDOMAIN</text:p>
      <text:p text:style-name="P53"/>
      <text:p text:style-name="P53"><text:span text:style-name="T37">Отже,</text:span> Debian (glibc) припиняє пошук після першої невдачі, оскільки наявність крапки в домені змушує його вважати ім’я абсолютним. Натомість Alpine (musl) подвоює трафік, надсилаючи запити на IPv4 та IPv6 паралельно, і після невдачі автоматично перебирає всі доступні суфікси з <text:span text:style-name="Source_20_Text">dns-search</text:span>. Це дозволяє Alpine знайти IP-адресу там, де Debian видає помилку, але ціною значного збільшення кількості запитів.</text:p>
      <text:p text:style-name="P57"/>
      <text:p text:style-name="P58">3) Golang application</text:p>
      <text:p text:style-name="P59">Dockerfile:</text:p>
      <text:p text:style-name="P58"/>
      <text:p text:style-name="P60"><text:span text:style-name="T38">FROM</text:span><text:span text:style-name="T39"> </text:span><text:span text:style-name="T40">golang</text:span><text:span text:style-name="T39">:</text:span><text:span text:style-name="T41">1.22-bookworm</text:span></text:p>
      <text:p text:style-name="P61"><text:span text:style-name="T42">WORKDIR</text:span><text:span text:style-name="T43"> </text:span><text:span text:style-name="T44">/app</text:span></text:p>
      <text:p text:style-name="P62"><text:span text:style-name="T8">COPY</text:span> <text:span text:style-name="T12">go.mod</text:span> <text:span text:style-name="T12">go.sum</text:span> <text:span text:style-name="T12">./</text:span></text:p>
      <text:p text:style-name="P61"><text:span text:style-name="T42">RUN</text:span><text:span text:style-name="T43"> </text:span><text:span text:style-name="T44">go</text:span><text:span text:style-name="T43"> </text:span><text:span text:style-name="T44">mod</text:span><text:span text:style-name="T43"> </text:span><text:span text:style-name="T44">download</text:span></text:p>
      <text:p text:style-name="P62"><text:span text:style-name="T8">COPY</text:span> <text:span text:style-name="T12">.</text:span> <text:span text:style-name="T12">.</text:span></text:p>
      <text:p text:style-name="P61"><text:span text:style-name="T42">RUN</text:span><text:span text:style-name="T43"> </text:span><text:span text:style-name="T44">go</text:span><text:span text:style-name="T43"> </text:span><text:span text:style-name="T44">build</text:span><text:span text:style-name="T43"> </text:span><text:span text:style-name="T44">-o</text:span><text:span text:style-name="T43"> </text:span><text:span text:style-name="T44">main</text:span><text:span text:style-name="T43"> </text:span><text:span text:style-name="T44">.</text:span></text:p>
      <text:p text:style-name="P62"><text:span text:style-name="T8">CMD</text:span> <text:span text:style-name="T12">[</text:span><text:span text:style-name="T15">"./main"</text:span><text:span text:style-name="T12">]</text:span></text:p>
      <text:p text:style-name="P63"/>
      <text:p text:style-name="P64">Час збірки: <text:span text:style-name="T6">time docker build -t go-app:full -f Dockerfile .</text:span></text:p>
      <text:p text:style-name="P65"/>
      <text:p text:style-name="P66">real <text:s text:c="3"/>0m25.297s</text:p>
      <text:p text:style-name="P66">user <text:s text:c="3"/>0m0.185s</text:p>
      <text:p text:style-name="P66">sys <text:s text:c="4"/>0m0.089s</text:p>
      <text:p text:style-name="P65"/>
      <text:p text:style-name="P65"><text:span text:style-name="T33">Розмір образу</text:span>: docker images go-app:full</text:p>
      <text:p text:style-name="P65"><text:s text:c="79"/>i Info → <text:s text:c="2"/>U <text:s/>In Use</text:p>
      <text:p text:style-name="P65">IMAGE <text:s text:c="8"/>ID <text:s text:c="12"/>DISK USAGE <text:s text:c="2"/>CONTENT SIZE <text:s text:c="2"/>EXTRA</text:p>
      <text:p text:style-name="P65">go-app:full <text:s text:c="2"/>75c29428317e <text:s text:c="6"/>1.34GB <text:s text:c="9"/>324MB</text:p>
      <text:p text:style-name="P59"/>
      <text:p text:style-name="P67">Вміст:</text:p>
      <text:p text:style-name="P67"/>
      <text:p text:style-name="P68">docker run --rm go-app:full ls -lh</text:p>
      <text:p text:style-name="P59">total 11M</text:p>
      <text:p text:style-name="P59">-rw-rw-r-- 1 root root <text:s/>131 May <text:s/>4 14:47 Dockerfile</text:p>
      <text:p text:style-name="P59">-rw-rw-r-- 1 root root 1.1K May <text:s/>4 14:45 README.rst</text:p>
      <text:p text:style-name="P59">drwxrwxr-x 2 root root 4.0K May <text:s/>4 14:45 cmd</text:p>
      <text:p text:style-name="P59">-rw-rw-r-- 1 root root <text:s/>181 May <text:s/>4 14:45 go.mod</text:p>
      <text:p text:style-name="P59">-rw-rw-r-- 1 root root <text:s/>74K May <text:s/>4 14:45 go.sum</text:p>
      <text:p text:style-name="P59">drwxrwxr-x 2 root root 4.0K May <text:s/>4 14:45 lib</text:p>
      <text:p text:style-name="P59">-rwxr-xr-x 1 root root <text:s/>11M May <text:s/>4 14:57 main</text:p>
      <text:p text:style-name="P59">-rw-rw-r-- 1 root root <text:s/>119 May <text:s/>4 14:45 main.go</text:p>
      <text:p text:style-name="P59"><text:soft-page-break/>drwxrwxr-x 2 root root 4.0K May <text:s/>4 14:45 templates</text:p>
      <text:p text:style-name="P59"/>
      <text:p text:style-name="P67">Неважко побачити, що фінальний образ у рази важчий. Це відбувається тому, що використовується базовий образ цілої системи, яка включає компілятор, стандартні бібліотеки, тощо, хоч для запуску цієї програми достатньо лише main файлу.</text:p>
      <text:p text:style-name="P67"/>
      <text:p text:style-name="P67">Оновлений варіант з використанням scratch:</text:p>
      <text:p text:style-name="P67"/>
      <text:p text:style-name="P69"><text:span text:style-name="T8">FROM</text:span> <text:span text:style-name="T9">golang</text:span>:<text:span text:style-name="T13">1.22-bookworm</text:span> <text:span text:style-name="T8">AS</text:span> <text:span text:style-name="T9">builder</text:span></text:p>
      <text:p text:style-name="P70"><text:span text:style-name="T8">WORKDIR</text:span> <text:span text:style-name="T12">/build</text:span></text:p>
      <text:p text:style-name="P70"><text:span text:style-name="T8">COPY</text:span> <text:span text:style-name="T12">go.mod</text:span> <text:span text:style-name="T12">go.sum</text:span> <text:span text:style-name="T12">./</text:span></text:p>
      <text:p text:style-name="P70"><text:span text:style-name="T8">RUN</text:span> <text:span text:style-name="T12">go</text:span> <text:span text:style-name="T12">mod</text:span> <text:span text:style-name="T12">download</text:span></text:p>
      <text:p text:style-name="P70"><text:span text:style-name="T8">COPY</text:span> <text:span text:style-name="T12">.</text:span> <text:span text:style-name="T12">.</text:span></text:p>
      <text:p text:style-name="P70"><text:span text:style-name="T8">RUN</text:span> <text:span text:style-name="T12">go</text:span> <text:span text:style-name="T12">build</text:span> <text:span text:style-name="T12">-o</text:span> <text:span text:style-name="T12">main</text:span> <text:span text:style-name="T12">.</text:span></text:p>
      <text:p text:style-name="P20"/>
      <text:p text:style-name="P70"><text:span text:style-name="T8">FROM</text:span> <text:span text:style-name="T9">scratch</text:span></text:p>
      <text:p text:style-name="P70"><text:span text:style-name="T8">COPY</text:span> <text:span text:style-name="T12">--from</text:span><text:span text:style-name="T14">=</text:span><text:span text:style-name="T13">builder</text:span> <text:span text:style-name="T12">/build/main</text:span> <text:span text:style-name="T12">/main</text:span></text:p>
      <text:p text:style-name="P70"><text:span text:style-name="T8">ENTRYPOINT</text:span> <text:span text:style-name="T12">[</text:span><text:span text:style-name="T15">"/main"</text:span><text:span text:style-name="T12">]</text:span></text:p>
      <text:p text:style-name="P71"/>
      <text:p text:style-name="P72">Час збірки: <text:span text:style-name="T45">time docker build -t go-app:scratch -f Dockerfile.v2 .</text:span></text:p>
      <text:p text:style-name="P73"/>
      <text:p text:style-name="P74">real <text:s text:c="3"/>0m10.106s</text:p>
      <text:p text:style-name="P74">user <text:s text:c="3"/>0m0.118s</text:p>
      <text:p text:style-name="P74">sys <text:s text:c="4"/>0m0.069s</text:p>
      <text:p text:style-name="P73"/>
      <text:p text:style-name="P73"><text:span text:style-name="T33">Розмір образу</text:span>: docker images go-app:scratch</text:p>
      <text:p text:style-name="P73"><text:s text:c="79"/>i Info → <text:s text:c="2"/>U <text:s/>In Use</text:p>
      <text:p text:style-name="P73">IMAGE <text:s text:c="11"/>ID <text:s text:c="12"/>DISK USAGE <text:s text:c="2"/>CONTENT SIZE <text:s text:c="2"/>EXTRA</text:p>
      <text:p text:style-name="P73">go-app:scratch <text:s text:c="2"/>c4e2ec8b3472 <text:s text:c="6"/>16.8MB <text:s text:c="8"/>6.01MB <text:s text:c="5"/></text:p>
      <text:p text:style-name="P75"/>
      <text:p text:style-name="P75">Вміст:</text:p>
      <text:p text:style-name="P75"/>
      <text:p text:style-name="P75"><draw:frame draw:style-name="fr3" draw:name="Image3" text:anchor-type="char" svg:width="6.6929in" svg:height="2.6689in" draw:z-index="2"><draw:image xlink:href="Pictures/1000000100000466000001C13FBC7572.png" xlink:type="simple" xlink:show="embed" xlink:actuate="onLoad" draw:mime-type="image/png"/></draw:frame></text:p>
      <text:p text:style-name="P76"><text:soft-page-break/>Отже, є лише <text:span text:style-name="T46">main і більше нічого. </text:span>Немає навіть базових <text:span text:style-name="T47">Linux утиліт, таких як ls, sh або bash через що запустити програму в лоб не можна. Такий варіант збірки є дуже швидким та компактним, але максимально не зручним на практиці.</text:span></text:p>
      <text:p text:style-name="P76"/>
      <text:p text:style-name="P76">Використання <text:span text:style-name="T48">distroless:</text:span></text:p>
      <text:p text:style-name="P76"/>
      <text:p text:style-name="P77"><text:span text:style-name="T8">FROM</text:span> <text:span text:style-name="T9">golang</text:span>:<text:span text:style-name="T13">1.22-bookworm</text:span> <text:span text:style-name="T8">AS</text:span> <text:span text:style-name="T9">builder</text:span></text:p>
      <text:p text:style-name="P70"><text:span text:style-name="T8">WORKDIR</text:span> <text:span text:style-name="T12">/build</text:span></text:p>
      <text:p text:style-name="P70"><text:span text:style-name="T8">COPY</text:span> <text:span text:style-name="T12">go.mod</text:span> <text:span text:style-name="T12">go.sum</text:span> <text:span text:style-name="T12">./</text:span></text:p>
      <text:p text:style-name="P70"><text:span text:style-name="T8">RUN</text:span> <text:span text:style-name="T12">go</text:span> <text:span text:style-name="T12">mod</text:span> <text:span text:style-name="T12">download</text:span></text:p>
      <text:p text:style-name="P70"><text:span text:style-name="T8">COPY</text:span> <text:span text:style-name="T12">.</text:span> <text:span text:style-name="T12">.</text:span></text:p>
      <text:p text:style-name="P70"><text:span text:style-name="T8">RUN</text:span> <text:span text:style-name="T12">go</text:span> <text:span text:style-name="T12">build</text:span> <text:span text:style-name="T12">-o</text:span> <text:span text:style-name="T12">main</text:span> <text:span text:style-name="T12">.</text:span></text:p>
      <text:p text:style-name="P20"/>
      <text:p text:style-name="P70"><text:span text:style-name="T8">FROM</text:span> gcr.io/<text:span text:style-name="T9">distroless/static-debian12</text:span></text:p>
      <text:p text:style-name="P70"><text:span text:style-name="T8">COPY</text:span> <text:span text:style-name="T12">--from</text:span><text:span text:style-name="T14">=</text:span><text:span text:style-name="T13">builder</text:span> <text:span text:style-name="T12">/build/main</text:span> <text:span text:style-name="T12">/main</text:span></text:p>
      <text:p text:style-name="P70"><text:span text:style-name="T8">ENTRYPOINT</text:span> <text:span text:style-name="T12">[</text:span><text:span text:style-name="T15">"/main"</text:span><text:span text:style-name="T12">]</text:span></text:p>
      <text:p text:style-name="P76"/>
      <text:p text:style-name="P78">Час збірки: <text:span text:style-name="T45"><text:s/>time docker build -t go-app:distroless -f Dockerfile.v3 .</text:span></text:p>
      <text:p text:style-name="P79"/>
      <text:p text:style-name="P79">real <text:s text:c="3"/>0m<text:span text:style-name="T49">12</text:span>.086s</text:p>
      <text:p text:style-name="P79">user <text:s text:c="3"/>0m0.119s</text:p>
      <text:p text:style-name="P79">sys <text:s text:c="4"/>0m0.062s</text:p>
      <text:p text:style-name="P80"/>
      <text:p text:style-name="P80"><text:span text:style-name="T33">Розмір образу</text:span>: docker images go-app:<text:span text:style-name="T49">distroless</text:span> <text:s text:c="134"/><text:tab/><text:tab/><text:tab/><text:tab/><text:tab/><text:tab/><text:tab/><text:tab/><text:tab/>i Info → <text:s text:c="2"/>U <text:s/>In Use</text:p>
      <text:p text:style-name="P80">IMAGE <text:s text:c="14"/>ID <text:s text:c="12"/>DISK USAGE <text:s text:c="2"/>CONTENT SIZE <text:s text:c="2"/>EXTRA</text:p>
      <text:p text:style-name="P80">go-app:distroless <text:s text:c="2"/>a0efdd56f0a5 <text:s text:c="6"/>22.9MB <text:s text:c="8"/>6.72MB <text:s text:c="8"/></text:p>
      <text:p text:style-name="P81"/>
      <text:p text:style-name="P81">Вміст<text:span text:style-name="T49">(скорочений)</text:span>:</text:p>
      <text:p text:style-name="P76"/>
      <text:p text:style-name="P75"><draw:frame draw:style-name="fr3" draw:name="Image4" text:anchor-type="char" svg:width="6.6929in" svg:height="2.6689in" draw:z-index="3"><draw:image xlink:href="Pictures/1000000100000466000001C1413DDF01.png" xlink:type="simple" xlink:show="embed" xlink:actuate="onLoad" draw:mime-type="image/png"/></draw:frame></text:p>
      <text:p text:style-name="P82"><text:span text:style-name="T50">Отже, distroless пропонує «золоту середину» між розміром та зручністю, додаючи лише необхідні файли для стабільної роботи застосунку. Хоча тут все </text:span><text:soft-page-break/><text:span text:style-name="T50">ще відсутні базові утиліти Linux, такі як </text:span><text:span text:style-name="Source_20_Text"><text:span text:style-name="T50">ls</text:span></text:span><text:span text:style-name="T50"> або </text:span><text:span text:style-name="Source_20_Text"><text:span text:style-name="T50">sh</text:span></text:span><text:span text:style-name="T50">, образ містить кореневі сертифікати та дані про часові пояси. Це дозволяє програмі безпечно здійснювати HTTPS-запити та коректно працювати з датами без додаткового ручного налаштування середовища.</text:span></text:p>
      <text:p text:style-name="P82"/>
      <text:p text:style-name="P8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4T11:41:35.279726476</meta:creation-date>
    <meta:generator>LibreOffice/26.2.1.2$Linux_X86_64 LibreOffice_project/8399f6259d8c87f40e7255cdb3c9b958f5e08948</meta:generator>
    <dc:date>2026-05-05T19:29:41.644732254</dc:date>
    <meta:editing-duration>PT29M41S</meta:editing-duration>
    <meta:editing-cycles>7</meta:editing-cycles>
    <meta:document-statistic meta:table-count="0" meta:image-count="4" meta:object-count="0" meta:page-count="10" meta:paragraph-count="222" meta:word-count="1231" meta:character-count="10480" meta:non-whitespace-character-count="7961"/>
  </office:meta>
</office:document-meta>
</file>